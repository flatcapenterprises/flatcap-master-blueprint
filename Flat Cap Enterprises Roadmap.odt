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t Cap Enterprises Roadmap</text:p>
      <text:p text:style-name="Standard"/>
      <text:p text:style-name="Standard">Phase 1 — Foundation</text:p>
      <text:p text:style-name="Standard">✔ Company created</text:p>
      <text:p text:style-name="Standard">✔ Domains purchased</text:p>
      <text:p text:style-name="Standard">✔ GitHub established</text:p>
      <text:p text:style-name="Standard">✔ Master Blueprint written</text:p>
      <text:p text:style-name="Standard">☐ Decision Journal</text:p>
      <text:p text:style-name="Standard">☐ Insight Journal</text:p>
      <text:p text:style-name="Standard">☐ Digital Assets</text:p>
      <text:p text:style-name="Standard">☐ Company website</text:p>
      <text:p text:style-name="Standard"/>
      <text:p text:style-name="Standard">Phase 2 — Revenue</text:p>
      <text:p text:style-name="Standard">☐ Add second business batch</text:p>
      <text:p text:style-name="Standard">☐ Publish Article #2</text:p>
      <text:p text:style-name="Standard">☐ Publish Article #3</text:p>
      <text:p text:style-name="Standard">☐ Newsletter launch</text:p>
      <text:p text:style-name="Standard">☐ SEO improvements</text:p>
      <text:p text:style-name="Standard">☐ AI optimization</text:p>
      <text:p text:style-name="Standard">☐ First advertiser</text:p>
      <text:p text:style-name="Standard">☐ First recurring customer</text:p>
      <text:p text:style-name="Standard"/>
      <text:p text:style-name="Standard">Phase 3 — Expansion</text:p>
      <text:p text:style-name="Standard">☐ Clone directory</text:p>
      <text:p text:style-name="Standard">☐ Electrician directory</text:p>
      <text:p text:style-name="Standard">☐ Landscaping directory</text:p>
      <text:p text:style-name="Standard">☐ HVAC directory</text:p>
      <text:p text:style-name="Standard"/>
      <text:p text:style-name="Standard">Phase 4 — Software</text:p>
      <text:p text:style-name="Standard">...</text:p>
      <text:p text:style-name="Standard"/>
      <text:p text:style-name="Standard">Phase 5 — Physical Businesses</text:p>
      <text:p text:style-name="Standard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9T20:09:49.531366800</meta:creation-date>
    <dc:date>2026-07-09T20:10:51.906557400</dc:date>
    <meta:editing-duration>PT1M3S</meta:editing-duration>
    <meta:editing-cycles>1</meta:editing-cycles>
    <meta:document-statistic meta:table-count="0" meta:image-count="0" meta:object-count="0" meta:page-count="1" meta:paragraph-count="28" meta:word-count="88" meta:character-count="531" meta:non-whitespace-character-count="466"/>
    <meta:generator>LibreOffice/26.2.4.2$Windows_X86_64 LibreOffice_project/0229ac93fcf0d7cbc6376066c6f35021cef002dc</meta:generator>
  </office:meta>
</office:document-meta>
</file>